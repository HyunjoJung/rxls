
<file path=content.xml><?xml version="1.0" encoding="utf-8"?>
<office:document-content xmlns:office="urn:oasis:names:tc:opendocument:xmlns:office:1.0" xmlns:dc="http://purl.org/dc/elements/1.1/" xmlns:draw="urn:oasis:names:tc:opendocument:xmlns:drawing:1.0" xmlns:table="urn:oasis:names:tc:opendocument:xmlns:table:1.0" xmlns:text="urn:oasis:names:tc:opendocument:xmlns:text:1.0" xmlns:xlink="http://www.w3.org/1999/xlink">
  <office:body>
    <office:spreadsheet>
      <table:content-validations>
        <table:content-validation table:name="PositiveAmount" table:condition="cell-content() &gt;= 0" table:allow-empty-cell="false"/>
      </table:content-validations>
      <table:table table:name="Visible" table:print-ranges="$Visible.$A$1:$Visible.$B$6">
        <table:table-header-columns>
          <table:table-column table:number-columns-repeated="2"/>
        </table:table-header-columns>
        <table:table-header-rows>
          <table:table-row>
            <table:table-cell office:value-type="string">
              <text:p>name</text:p>
            </table:table-cell>
            <table:table-cell office:value-type="string">
              <text:p>amount</text:p>
            </table:table-cell>
          </table:table-row>
        </table:table-header-rows>
        <table:table-row table:number-rows-repeated="2">
          <table:table-cell office:value-type="string">
            <text:p>road</text:p>
          </table:table-cell>
          <table:table-cell table:content-validation-name="PositiveAmount" office:value-type="float" office:value="125">
            <text:p>125</text:p>
          </table:table-cell>
        </table:table-row>
        <table:table-row>
          <table:table-cell office:value-type="string" table:number-columns-spanned="2">
            <text:p>merged</text:p>
          </table:table-cell>
          <table:covered-table-cell/>
        </table:table-row>
        <table:table-row>
          <table:table-cell office:value-type="string">
            <text:p><text:a xlink:href="https://example.com/ods">link</text:a></text:p>
            <office:annotation>
              <dc:creator>fixture</dc:creator>
              <text:p>verify external link</text:p>
            </office:annotation>
          </table:table-cell>
        </table:table-row>
        <table:table-row>
          <table:table-cell office:value-type="string">
            <text:p>image</text:p>
          </table:table-cell>
          <table:table-cell>
            <draw:frame draw:name="Logo">
              <draw:image xlink:href="Pictures/logo.png" xlink:type="simple" xlink:show="embed" xlink:actuate="onLoad"/>
            </draw:frame>
          </table:table-cell>
        </table:table-row>
      </table:table>
      <table:table table:name="Hidden" table:style-name="hidden-table">
        <table:table-row>
          <table:table-cell office:value-type="string">
            <text:p>secret</text:p>
          </table:table-cell>
        </table:table-row>
      </table:table>
      <table:database-ranges>
        <table:database-range table:name="VisibleBlock" table:target-range-address="$Visible.$A$1:$Visible.$B$3" table:display-filter-buttons="true"/>
      </table:database-ranges>
      <table:named-expressions>
        <table:named-range table:name="VisibleTotal" table:cell-range-address="$Visible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able="urn:oasis:names:tc:opendocument:xmlns:table:1.0">
  <office:styles>
    <style:style style:name="hidden-table" style:family="table">
      <style:table-properties table:display="false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rxls ODS fixture</dc:title>
    <meta:initial-creator>rxls fixture generator</meta:initial-creator>
    <dc:creator>rxls fixture reviewer</dc:creator>
  </office:meta>
</office:document-meta>
</file>